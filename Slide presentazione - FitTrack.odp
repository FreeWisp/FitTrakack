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C000006987BAFEAD9.png" manifest:media-type="image/png"/>
  <manifest:file-entry manifest:full-path="Pictures/100000000000030C0000069810985721.png" manifest:media-type="image/png"/>
  <manifest:file-entry manifest:full-path="Pictures/100000000000030C00000698BCFD6DBE.png" manifest:media-type="image/png"/>
  <manifest:file-entry manifest:full-path="Pictures/100000000000030C000006981C696E94.png" manifest:media-type="image/png"/>
  <manifest:file-entry manifest:full-path="Pictures/100000000000030C00000698FCC53EAB.png" manifest:media-type="image/png"/>
  <manifest:file-entry manifest:full-path="Pictures/100000000000030C0000069842A265C3.png" manifest:media-type="image/png"/>
  <manifest:file-entry manifest:full-path="Pictures/100000000000030C0000069862CFFD7A.png" manifest:media-type="image/png"/>
  <manifest:file-entry manifest:full-path="Pictures/100000000000030C00000698BBEA768B.png" manifest:media-type="image/png"/>
  <manifest:file-entry manifest:full-path="Pictures/100000000000030C00000698B6C7C965.png" manifest:media-type="image/png"/>
  <manifest:file-entry manifest:full-path="Pictures/100000000000030C00000698349252DE.png" manifest:media-type="image/png"/>
  <manifest:file-entry manifest:full-path="Pictures/100000000000030C000006983F0BDC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e111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53cm" svg:stroke-color="#2b3442" draw:fill="solid" draw:fill-color="#1d242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40%" loext:shadow-blur="0.353cm"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2b3442" draw:fill="solid" draw:fill-color="#1d24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35cm" svg:stroke-color="#8b7cff" draw:fill="solid" draw:fill-color="#8b7c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53cm" svg:stroke-color="#8b7cff" draw:fill="solid" draw:fill-color="#1d24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71cm" svg:stroke-color="#9aa6b8" draw:marker-start="msArrowEnd_20_5" draw:marker-start-width="0.213cm" draw:marker-start-center="false" draw:marker-end="msArrowEnd_20_5" draw:marker-end-width="0.213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2" style:family="graphic" style:parent-style-name="standard">
      <style:graphic-properties draw:stroke="solid" svg:stroke-width="0.053cm" svg:stroke-color="#38bdf8" draw:fill="solid" draw:fill-color="#1d24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53cm" svg:stroke-color="#4ade80" draw:fill="solid" draw:fill-color="#1d24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solid" draw:fill-color="#1d242e"/>
      <style:paragraph-properties fo:text-align="left"/>
      <style:text-properties fo:font-size="18pt"/>
    </style:style>
    <style:style style:name="P4" style:family="paragraph">
      <loext:graphic-properties draw:fill="none"/>
      <style:paragraph-properties fo:text-align="lef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left" fo:text-indent="0cm"/>
    </style:style>
    <style:style style:name="P6" style:family="paragraph">
      <loext:graphic-properties draw:fill="none" draw:fill-color="#ffffff"/>
      <style:paragraph-properties fo:text-align="lef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.353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.247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.247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solid" draw:fill-color="#8b7cff"/>
      <style:paragraph-properties fo:text-align="lef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.318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.318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.212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.212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bold" fo:background-color="transparent" style:font-name-asian="Arial1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8b7c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name-asian="Arial1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9aa6b8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Arial1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Arial1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Arial1" style:font-size-asian="13pt" style:font-style-asian="normal" style:font-weight-asian="bold" style:font-name-complex="Arial" style:font-size-complex="13pt" style:font-style-complex="normal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Arial1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f87171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name-asian="Arial1" style:font-size-asian="15pt" style:font-style-asian="normal" style:font-weight-asian="bold" style:font-name-complex="Arial" style:font-size-complex="15pt" style:font-style-complex="normal" style:font-weight-complex="bold"/>
    </style:style>
    <style:style style:name="T10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12.5pt" fo:letter-spacing="normal" fo:language="en" fo:country="US" fo:font-style="normal" style:text-underline-style="none" fo:font-weight="normal" fo:background-color="transparent" style:font-name-asian="Arial1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11" style:family="text">
      <style:text-properties fo:font-variant="normal" fo:text-transform="none" fo:color="#4ade8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name-asian="Arial1" style:font-size-asian="15pt" style:font-style-asian="normal" style:font-weight-asian="bold" style:font-name-complex="Arial" style:font-size-complex="15pt" style:font-style-complex="normal" style:font-weight-complex="bold"/>
    </style:style>
    <style:style style:name="T12" style:family="text">
      <style:text-properties fo:font-variant="normal" fo:text-transform="none" fo:color="#8b7cff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name-asian="Arial1" style:font-size-asian="15pt" style:font-style-asian="normal" style:font-weight-asian="bold" style:font-name-complex="Arial" style:font-size-complex="15pt" style:font-style-complex="normal" style:font-weight-complex="bold"/>
    </style:style>
    <style:style style:name="T13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11.5pt" fo:letter-spacing="normal" fo:language="en" fo:country="US" fo:font-style="normal" style:text-underline-style="none" fo:font-weight="normal" fo:background-color="transparent" style:font-name-asian="Arial1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14" style:family="text">
      <style:text-properties fo:font-variant="normal" fo:text-transform="none" fo:color="#8b7cff" loext:opacity="100%" style:text-outline="false" style:text-line-through-style="none" style:text-line-through-type="none" style:text-position="0% 100%" style:font-name="Arial" fo:font-size="12.5pt" fo:letter-spacing="normal" fo:language="en" fo:country="US" fo:font-style="normal" style:text-underline-style="none" fo:font-weight="bold" fo:background-color="transparent" style:font-name-asian="Arial1" style:font-size-asian="12.5pt" style:font-style-asian="normal" style:font-weight-asian="bold" style:font-name-complex="Arial" style:font-size-complex="12.5pt" style:font-style-complex="normal" style:font-weight-complex="bold"/>
    </style:style>
    <style:style style:name="T15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12.5pt" fo:letter-spacing="normal" fo:language="en" fo:country="US" fo:font-style="normal" style:text-underline-style="none" fo:font-weight="bold" fo:background-color="transparent" style:font-name-asian="Arial1" style:font-size-asian="12.5pt" style:font-style-asian="normal" style:font-weight-asian="bold" style:font-name-complex="Arial" style:font-size-complex="12.5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name-asian="Arial1" style:font-size-asian="16pt" style:font-style-asian="normal" style:font-weight-asian="bold" style:font-name-complex="Arial" style:font-size-complex="16pt" style:font-style-complex="normal" style:font-weight-complex="bold"/>
    </style:style>
    <style:style style:name="T17" style:family="text">
      <style:text-properties fo:font-variant="normal" fo:text-transform="none" fo:color="#8b7cff" loext:opacity="100%" style:text-outline="false" style:text-line-through-style="none" style:text-line-through-type="none" style:text-position="0% 100%" style:font-name="Arial" fo:font-size="11.5pt" fo:letter-spacing="normal" fo:language="en" fo:country="US" fo:font-style="normal" style:text-underline-style="none" fo:font-weight="bold" fo:background-color="transparent" style:font-name-asian="Arial1" style:font-size-asian="11.5pt" style:font-style-asian="normal" style:font-weight-asian="bold" style:font-name-complex="Arial" style:font-size-complex="11.5pt" style:font-style-complex="normal" style:font-weight-complex="bold"/>
    </style:style>
    <style:style style:name="T18" style:family="text">
      <style:text-properties fo:font-variant="normal" fo:text-transform="none" fo:color="#9aa6b8" loext:opacity="100%" style:text-outline="false" style:text-line-through-style="none" style:text-line-through-type="none" style:text-position="0% 100%" style:font-name="Arial" fo:font-size="11.5pt" fo:letter-spacing="normal" fo:language="en" fo:country="US" fo:font-style="normal" style:text-underline-style="none" fo:font-weight="normal" fo:background-color="transparent" style:font-name-asian="Arial1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19" style:family="text">
      <style:text-properties fo:font-variant="normal" fo:text-transform="none" fo:color="#8b7cff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Arial1" style:font-size-asian="13pt" style:font-style-asian="normal" style:font-weight-asian="bold" style:font-name-complex="Arial" style:font-size-complex="13pt" style:font-style-complex="normal" style:font-weight-complex="bold"/>
    </style:style>
    <style:style style:name="T20" style:family="text">
      <style:text-properties fo:font-variant="normal" fo:text-transform="none" fo:color="#9aa6b8" loext:opacity="100%" style:text-outline="false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name-asian="Arial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1" style:family="text">
      <style:text-properties fo:font-variant="normal" fo:text-transform="none" fo:color="#38bdf8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Arial1" style:font-size-asian="13pt" style:font-style-asian="normal" style:font-weight-asian="bold" style:font-name-complex="Arial" style:font-size-complex="13pt" style:font-style-complex="normal" style:font-weight-complex="bold"/>
    </style:style>
    <style:style style:name="T22" style:family="text">
      <style:text-properties fo:font-variant="normal" fo:text-transform="none" fo:color="#4ade8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Arial1" style:font-size-asian="13pt" style:font-style-asian="normal" style:font-weight-asian="bold" style:font-name-complex="Arial" style:font-size-complex="13pt" style:font-style-complex="normal" style:font-weight-complex="bold"/>
    </style:style>
    <style:style style:name="T23" style:family="text">
      <style:text-properties fo:font-variant="normal" fo:text-transform="none" fo:color="#9aa6b8" loext:opacity="100%" style:text-outline="false" style:text-line-through-style="none" style:text-line-through-type="none" style:text-position="0% 100%" style:font-name="Arial" fo:font-size="10.5pt" fo:letter-spacing="normal" fo:language="en" fo:country="US" fo:font-style="italic" style:text-underline-style="none" fo:font-weight="normal" fo:background-color="transparent" style:font-name-asian="Arial1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4" style:family="text">
      <style:text-properties fo:font-variant="normal" fo:text-transform="none" fo:color="#f1f4f9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name-asian="Arial1" style:font-size-asian="44pt" style:font-style-asian="normal" style:font-weight-asian="bold" style:font-name-complex="Arial" style:font-size-complex="44pt" style:font-style-complex="normal" style:font-weight-complex="bold"/>
    </style:style>
    <style:style style:name="T25" style:family="text">
      <style:text-properties fo:font-variant="normal" fo:text-transform="none" fo:color="#9aa6b8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4ade80" loext:opacity="100%" style:text-outline="false" style:text-line-through-style="none" style:text-line-through-type="none" style:text-position="0% 100%" style:font-name="Courier New" fo:font-size="12.5pt" fo:letter-spacing="normal" fo:language="en" fo:country="US" fo:font-style="normal" style:text-underline-style="none" fo:font-weight="normal" fo:background-color="transparent" style:font-name-asian="Courier New1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27" style:family="text">
      <style:text-properties fo:font-variant="normal" fo:text-transform="none" fo:color="#9aa6b8" loext:opacity="100%" style:text-outline="false" style:text-line-through-style="none" style:text-line-through-type="none" style:text-position="0% 100%" style:font-name="Arial" fo:font-size="12.5pt" fo:letter-spacing="normal" fo:language="en" fo:country="US" fo:font-style="normal" style:text-underline-style="none" fo:font-weight="normal" fo:background-color="transparent" style:font-name-asian="Arial1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28" style:family="text">
      <style:text-properties fo:font-variant="normal" fo:text-transform="none" fo:color="#8b7c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1f4f9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7c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aa6b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8717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423cm"/>
        <style:text-properties fo:font-family="OpenSymbol" fo:color="#f1f4f9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ade8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423cm"/>
        <style:text-properties fo:font-family="OpenSymbol" fo:color="#8b7c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8bdf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 0" draw:style-name="gr1" draw:text-style-name="P2" draw:layer="layout" svg:width="12.191cm" svg:height="2.539cm" svg:x="1.524cm" svg:y="3.81cm">
          <text:p text:style-name="P1"><text:span text:style-name="T1">FitTra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2" draw:layer="layout" svg:width="12.191cm" svg:height="1.142cm" svg:x="1.524cm" svg:y="6.477cm">
          <text:p text:style-name="P1"><text:span text:style-name="T2">Fitness &amp; Workout Tracker Ap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2" draw:layer="layout" svg:width="12.191cm" svg:height="0.888cm" svg:x="1.524cm" svg:y="7.747cm">
          <text:p text:style-name="P1"><text:span text:style-name="T3">Esercizi · Schede · Agenda · Diario · Obiettiv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2" draw:layer="layout" svg:width="12.191cm" svg:height="2.539cm" svg:x="1.524cm" svg:y="10.541cm">
          <text:p text:style-name="P1"><text:span text:style-name="T4">Corso di Mobile Programming — Traccia #2</text:span></text:p>
          <text:p text:style-name="P1"><text:span text:style-name="T5">Giuseppe Apostolico &amp; Mario Coppola</text:span></text:p>
          <text:p text:style-name="P1"><text:span text:style-name="T3">React Native · Exp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" draw:text-style-name="P3" draw:layer="layout" svg:width="4.948cm" svg:height="10.413cm" svg:x="13.716cm" svg:y="2.032cm">
          <text:p/>
          <draw:enhanced-geometry draw:mirror-horizontal="false" draw:mirror-vertical="false" svg:viewBox="0 0 0 0" draw:glue-points="?f8 0 0 ?f9 ?f8 ?f10 ?f11 ?f9" draw:text-areas="?f5 ?f5 ?f6 ?f7" draw:type="ooxml-roundRect" draw:modifiers="61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4.694cm" svg:height="10.159cm" svg:x="13.843cm" svg:y="2.159cm">
          <draw:image xlink:href="Pictures/100000000000030C000006983F0BDCAF.png" xlink:type="simple" xlink:show="embed" xlink:actuate="onLoad" draw:mime-type="image/png">
            <text:p/>
          </draw:image>
          <svg:desc>C:\Users\Rosa Accarino\OneDrive\Desktop\Giuseppe\Università\Mobile programming\FitTrack\docs\screenshots\01-home.png</svg:desc>
        </draw:frame>
        <draw:custom-shape draw:name="Shape 5" draw:style-name="gr5" draw:text-style-name="P3" draw:layer="layout" svg:width="4.948cm" svg:height="10.413cm" svg:x="18.923cm" svg:y="1.27cm">
          <text:p/>
          <draw:enhanced-geometry draw:mirror-horizontal="false" draw:mirror-vertical="false" svg:viewBox="0 0 0 0" draw:glue-points="?f8 0 0 ?f9 ?f8 ?f10 ?f11 ?f9" draw:text-areas="?f5 ?f5 ?f6 ?f7" draw:type="ooxml-roundRect" draw:modifiers="61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1" draw:style-name="gr6" draw:text-style-name="P4" draw:layer="layout" svg:width="4.694cm" svg:height="10.159cm" svg:x="19.05cm" svg:y="1.397cm">
          <draw:image xlink:href="Pictures/100000000000030C00000698BBEA768B.png" xlink:type="simple" xlink:show="embed" xlink:actuate="onLoad" draw:mime-type="image/png">
            <text:p/>
          </draw:image>
          <svg:desc>C:\Users\Rosa Accarino\OneDrive\Desktop\Giuseppe\Università\Mobile programming\FitTrack\docs\screenshots\07-allenamento-guidato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Presentazione del progetto FitTrack: app per organizzare allenamenti, sviluppata in React Native con Expo. Traccia 2 del corso di Mobile Programming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Text 0" draw:style-name="gr8" draw:text-style-name="P2" draw:layer="layout" svg:width="22.859cm" svg:height="1.396cm" svg:x="1.27cm" svg:y="0.711cm">
          <text:p text:style-name="P1"><text:span text:style-name="T8">L’ide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" draw:text-style-name="P2" draw:layer="layout" svg:width="22.859cm" svg:height="0.761cm" svg:x="1.27cm" svg:y="1.981cm">
          <text:p text:style-name="P1"><text:span text:style-name="T3">Il problema e la soluzio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" draw:text-style-name="P3" draw:layer="layout" svg:width="9.143cm" svg:height="9.651cm" svg:x="1.27cm" svg:y="3.175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3" draw:style-name="gr11" draw:text-style-name="P2" draw:layer="layout" svg:width="7.873cm" svg:height="0.888cm" svg:x="1.905cm" svg:y="3.81cm">
          <text:p text:style-name="P1"><text:span text:style-name="T9">Il proble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" draw:text-style-name="P10" draw:layer="layout" svg:width="8cm" svg:height="7.365cm" svg:x="1.905cm" svg:y="4.953cm">
          <text:list text:style-name="L7">
            <text:list-item>
              <text:p text:style-name="P9"><text:span text:style-name="T10">Schede su fogli di carta o note sparse</text:span></text:p>
            </text:list-item>
            <text:list-item>
              <text:p text:style-name="P9"><text:span text:style-name="T10">Nessuna memoria dei carichi sollevati</text:span></text:p>
            </text:list-item>
            <text:list-item>
              <text:p text:style-name="P9"><text:span text:style-name="T10">“Quante volte mi sono allenato questa settimana?”</text:span></text:p>
            </text:list-item>
            <text:list-item>
              <text:p text:style-name="P9"><text:span text:style-name="T10">Obiettivi dichiarati ma mai misurati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" draw:text-style-name="P3" draw:layer="layout" svg:width="9.143cm" svg:height="9.651cm" svg:x="11.049cm" svg:y="3.175cm">
          <text:p/>
          <draw:enhanced-geometry draw:mirror-horizontal="false" draw:mirror-vertical="false" svg:viewBox="0 0 0 0" draw:glue-points="?f8 0 0 ?f9 ?f8 ?f10 ?f11 ?f9" draw:text-areas="?f5 ?f5 ?f6 ?f7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6" draw:style-name="gr13" draw:text-style-name="P2" draw:layer="layout" svg:width="7.873cm" svg:height="0.888cm" svg:x="11.684cm" svg:y="3.81cm">
          <text:p text:style-name="P1"><text:span text:style-name="T11">La soluzio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0" draw:layer="layout" svg:width="8cm" svg:height="7.365cm" svg:x="11.684cm" svg:y="4.953cm">
          <text:list text:style-name="L7">
            <text:list-item>
              <text:p text:style-name="P9"><text:span text:style-name="T10">Tutto in un’unica app, 100% offline</text:span></text:p>
            </text:list-item>
            <text:list-item>
              <text:p text:style-name="P9"><text:span text:style-name="T10">La scheda diventa sessione pianificata, poi voce di diario</text:span></text:p>
            </text:list-item>
            <text:list-item>
              <text:p text:style-name="P9"><text:span text:style-name="T10">Statistiche e obiettivi si aggiornano da soli</text:span></text:p>
            </text:list-item>
            <text:list-item>
              <text:p text:style-name="P9"><text:span text:style-name="T10">Allenamento guidato con timer in palestra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3" draw:layer="layout" svg:width="3.891cm" svg:height="8.127cm" svg:x="20.396cm" svg:y="3.81cm">
          <text:p/>
          <draw:enhanced-geometry draw:mirror-horizontal="false" draw:mirror-vertical="false" svg:viewBox="0 0 0 0" draw:glue-points="?f8 0 0 ?f9 ?f8 ?f10 ?f11 ?f9" draw:text-areas="?f5 ?f5 ?f6 ?f7" draw:type="ooxml-roundRect" draw:modifiers="78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3.637cm" svg:height="7.873cm" svg:x="20.523cm" svg:y="3.937cm">
          <draw:image xlink:href="Pictures/100000000000030C000006983F0BDCAF.png" xlink:type="simple" xlink:show="embed" xlink:actuate="onLoad" draw:mime-type="image/png">
            <text:p/>
          </draw:image>
          <svg:desc>C:\Users\Rosa Accarino\OneDrive\Desktop\Giuseppe\Università\Mobile programming\FitTrack\docs\screenshots\01-home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Chi si allena disperde le informazioni tra appunti e memoria. FitTrack collega scheda, agenda, diario e obiettivi in un unico flusso di dati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Text 0" draw:style-name="gr15" draw:text-style-name="P2" draw:layer="layout" svg:width="22.859cm" svg:height="1.396cm" svg:x="1.27cm" svg:y="0.711cm">
          <text:p text:style-name="P1"><text:span text:style-name="T8">Funzionalità principal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" draw:text-style-name="P2" draw:layer="layout" svg:width="22.859cm" svg:height="0.761cm" svg:x="1.27cm" svg:y="1.981cm">
          <text:p text:style-name="P1"><text:span text:style-name="T3">CRUD completo su tutte le entità richieste dalla tracc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" draw:text-style-name="P3" draw:layer="layout" svg:width="7.441cm" svg:height="4.368cm" svg:x="1.27cm" svg:y="3.302cm">
          <text:p/>
          <draw:enhanced-geometry draw:mirror-horizontal="false" draw:mirror-vertical="false" svg:viewBox="0 0 0 0" draw:glue-points="?f8 0 0 ?f9 ?f8 ?f10 ?f11 ?f9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3" draw:style-name="gr17" draw:text-style-name="P2" draw:layer="layout" svg:width="6.425cm" svg:height="0.888cm" svg:x="1.778cm" svg:y="3.708cm">
          <text:p text:style-name="P1"><text:span text:style-name="T12">🏋️ <text:s/>Eserciz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" draw:text-style-name="P2" draw:layer="layout" svg:width="6.425cm" svg:height="2.463cm" svg:x="1.778cm" svg:y="4.775cm">
          <text:p text:style-name="P1"><text:span text:style-name="T13">Catalogo con gruppo muscolare, difficoltà, attrezzatura. Ricerca e filtr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" draw:text-style-name="P3" draw:layer="layout" svg:width="7.441cm" svg:height="4.368cm" svg:x="9.22cm" svg:y="3.302cm">
          <text:p/>
          <draw:enhanced-geometry draw:mirror-horizontal="false" draw:mirror-vertical="false" svg:viewBox="0 0 0 0" draw:glue-points="?f8 0 0 ?f9 ?f8 ?f10 ?f11 ?f9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6" draw:style-name="gr19" draw:text-style-name="P2" draw:layer="layout" svg:width="6.425cm" svg:height="0.888cm" svg:x="9.728cm" svg:y="3.708cm">
          <text:p text:style-name="P1"><text:span text:style-name="T12">📋 <text:s/>Sche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" draw:text-style-name="P2" draw:layer="layout" svg:width="6.425cm" svg:height="2.463cm" svg:x="9.728cm" svg:y="4.775cm">
          <text:p text:style-name="P1"><text:span text:style-name="T13">Esercizi con serie, ripetizioni, recupero, carico e ordine. Duplicazion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3" draw:layer="layout" svg:width="7.441cm" svg:height="4.368cm" svg:x="17.17cm" svg:y="3.302cm">
          <text:p/>
          <draw:enhanced-geometry draw:mirror-horizontal="false" draw:mirror-vertical="false" svg:viewBox="0 0 0 0" draw:glue-points="?f8 0 0 ?f9 ?f8 ?f10 ?f11 ?f9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9" draw:style-name="gr21" draw:text-style-name="P2" draw:layer="layout" svg:width="6.425cm" svg:height="0.888cm" svg:x="17.678cm" svg:y="3.708cm">
          <text:p text:style-name="P1"><text:span text:style-name="T12">📅 <text:s/>Agen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2" draw:text-style-name="P2" draw:layer="layout" svg:width="6.425cm" svg:height="2.463cm" svg:x="17.678cm" svg:y="4.775cm">
          <text:p text:style-name="P1"><text:span text:style-name="T13">Pianificazione settimanale: da svolgere, completata, saltat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" draw:text-style-name="P3" draw:layer="layout" svg:width="7.441cm" svg:height="4.368cm" svg:x="1.27cm" svg:y="8.306cm">
          <text:p/>
          <draw:enhanced-geometry draw:mirror-horizontal="false" draw:mirror-vertical="false" svg:viewBox="0 0 0 0" draw:glue-points="?f8 0 0 ?f9 ?f8 ?f10 ?f11 ?f9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2" draw:style-name="gr23" draw:text-style-name="P2" draw:layer="layout" svg:width="6.425cm" svg:height="0.888cm" svg:x="1.778cm" svg:y="8.712cm">
          <text:p text:style-name="P1"><text:span text:style-name="T12">📖 <text:s/>Diar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4" draw:text-style-name="P2" draw:layer="layout" svg:width="6.425cm" svg:height="2.463cm" svg:x="1.778cm" svg:y="9.779cm">
          <text:p text:style-name="P1"><text:span text:style-name="T13">Allenamenti svolti: serie, carichi, durata, fatica. Confronto tra due allenament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3" draw:layer="layout" svg:width="7.441cm" svg:height="4.368cm" svg:x="9.22cm" svg:y="8.306cm">
          <text:p/>
          <draw:enhanced-geometry draw:mirror-horizontal="false" draw:mirror-vertical="false" svg:viewBox="0 0 0 0" draw:glue-points="?f8 0 0 ?f9 ?f8 ?f10 ?f11 ?f9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5" draw:style-name="gr25" draw:text-style-name="P2" draw:layer="layout" svg:width="6.425cm" svg:height="0.888cm" svg:x="9.728cm" svg:y="8.712cm">
          <text:p text:style-name="P1"><text:span text:style-name="T12">🎯 <text:s/>Obiettiv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6" draw:text-style-name="P2" draw:layer="layout" svg:width="6.425cm" svg:height="2.463cm" svg:x="9.728cm" svg:y="9.779cm">
          <text:p text:style-name="P1"><text:span text:style-name="T13">Target misurabili; avanzamento automatico da frequenza e minut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0" draw:text-style-name="P3" draw:layer="layout" svg:width="7.441cm" svg:height="4.368cm" svg:x="17.17cm" svg:y="8.306cm">
          <text:p/>
          <draw:enhanced-geometry draw:mirror-horizontal="false" draw:mirror-vertical="false" svg:viewBox="0 0 0 0" draw:glue-points="?f8 0 0 ?f9 ?f8 ?f10 ?f11 ?f9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8" draw:style-name="gr27" draw:text-style-name="P2" draw:layer="layout" svg:width="6.425cm" svg:height="0.888cm" svg:x="17.678cm" svg:y="8.712cm">
          <text:p text:style-name="P1"><text:span text:style-name="T12">📊 <text:s/>And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8" draw:text-style-name="P2" draw:layer="layout" svg:width="6.425cm" svg:height="2.463cm" svg:x="17.678cm" svg:y="9.779cm">
          <text:p text:style-name="P1"><text:span text:style-name="T13">Grafici settimanali, distribuzione muscolare, pianificato vs completa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Sei aree funzionali. Tutte le entità hanno inserimento, modifica, visualizzazione e cancellazione, come richiesto dai vincoli tecnici della traccia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Text 0" draw:style-name="gr29" draw:text-style-name="P2" draw:layer="layout" svg:width="22.859cm" svg:height="1.396cm" svg:x="1.27cm" svg:y="0.711cm">
          <text:p text:style-name="P1"><text:span text:style-name="T8">Esercizi e sche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0" draw:text-style-name="P2" draw:layer="layout" svg:width="22.859cm" svg:height="0.761cm" svg:x="1.27cm" svg:y="1.981cm">
          <text:p text:style-name="P1"><text:span text:style-name="T3">Le fondamenta dell’ap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" draw:text-style-name="P12" draw:layer="layout" svg:width="11.937cm" svg:height="9.905cm" svg:x="1.27cm" svg:y="3.302cm">
          <text:list text:style-name="L9">
            <text:list-item>
              <text:p text:style-name="P11"><text:span text:style-name="T14">Esercizi</text:span></text:p>
            </text:list-item>
          </text:list>
          <text:list text:style-name="L7">
            <text:list-item>
              <text:p text:style-name="P11"><text:span text:style-name="T10">La pagina di esercizi consente di aggiungere esercizi personalizzati, modificare o rimuovere quelli gia esistenti e filtrare per tipo o con ricerca diretta</text:span></text:p>
            </text:list-item>
          </text:list>
          <text:list text:style-name="L9">
            <text:list-item>
              <text:p text:style-name="P11"><text:span text:style-name="T14">Schede di allenamento</text:span></text:p>
            </text:list-item>
          </text:list>
          <text:list text:style-name="L7">
            <text:list-item>
              <text:p text:style-name="P11"><text:span text:style-name="T10">Le schede invece sono insiemi di esercizi singoli, compresi di spiegazione del singolo esercizio )</text:span></text:p>
            </text:list-item>
            <text:list-item>
              <text:p text:style-name="P11"><text:span text:style-name="T10">L’editor ci consente anche di scegliere il livello piu appropiato e per singolo esercizio scegliere: serie, ripetizioni, recupero e peso 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" draw:text-style-name="P3" draw:layer="layout" svg:width="5.006cm" svg:height="10.54cm" svg:x="13.843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4.752cm" svg:height="10.286cm" svg:x="13.97cm" svg:y="2.921cm">
          <draw:image xlink:href="Pictures/100000000000030C00000698349252DE.png" xlink:type="simple" xlink:show="embed" xlink:actuate="onLoad" draw:mime-type="image/png">
            <text:p/>
          </draw:image>
          <svg:desc>C:\Users\Rosa Accarino\OneDrive\Desktop\Giuseppe\Università\Mobile programming\FitTrack\docs\screenshots\02-esercizi.png</svg:desc>
        </draw:frame>
        <draw:custom-shape draw:name="Shape 4" draw:style-name="gr5" draw:text-style-name="P3" draw:layer="layout" svg:width="5.006cm" svg:height="10.54cm" svg:x="19.177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1" draw:style-name="gr6" draw:text-style-name="P4" draw:layer="layout" svg:width="4.752cm" svg:height="10.286cm" svg:x="19.304cm" svg:y="2.921cm">
          <draw:image xlink:href="Pictures/100000000000030C0000069862CFFD7A.png" xlink:type="simple" xlink:show="embed" xlink:actuate="onLoad" draw:mime-type="image/png">
            <text:p/>
          </draw:image>
          <svg:desc>C:\Users\Rosa Accarino\OneDrive\Desktop\Giuseppe\Università\Mobile programming\FitTrack\docs\screenshots\06-scheda-dettaglio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Gli esercizi sono il vocabolario dell’app; le schede li combinano con serie, ripetizioni, recupero e carico. Alla cancellazione di un esercizio, il reducer lo rimuove anche dagli items delle schede: integrità referenziale centralizzata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Text 0" draw:style-name="gr32" draw:text-style-name="P2" draw:layer="layout" svg:width="22.859cm" svg:height="1.396cm" svg:x="1.27cm" svg:y="0.711cm">
          <text:p text:style-name="P1"><text:span text:style-name="T8">Agenda delle session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" draw:text-style-name="P2" draw:layer="layout" svg:width="22.859cm" svg:height="0.761cm" svg:x="1.27cm" svg:y="1.981cm">
          <text:p text:style-name="P1"><text:span text:style-name="T3">Pianificazione settimana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" draw:text-style-name="P10" draw:layer="layout" svg:width="11.937cm" svg:height="9.905cm" svg:x="1.27cm" svg:y="3.302cm">
          <text:list text:style-name="L7">
            <text:list-item>
              <text:p text:style-name="P9"><text:span text:style-name="T10">Consente di avere un calendario dei prossimi allenamenti</text:span></text:p>
            </text:list-item>
            <text:list-item>
              <text:p text:style-name="P9"><text:span text:style-name="T10">Si puo collegare una sessione direttamente ad una scheda a scelta oppure scegliere solo un titolo</text:span></text:p>
            </text:list-item>
            <text:list-item>
              <text:p text:style-name="P9"><text:span text:style-name="T15">Stato: da svolgere · completata · saltata</text:span></text:p>
            </text:list-item>
            <text:list-item>
              <text:p text:style-name="P9"><text:span text:style-name="T10">Permentte la Duplicazione della sessione alla settimana successiva</text:span></text:p>
            </text:list-item>
            <text:list-item>
              <text:p text:style-name="P9"><text:span text:style-name="T10">Dalla sessione di oggi si avvia direttamente l’allenamento guidato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" draw:text-style-name="P3" draw:layer="layout" svg:width="5.006cm" svg:height="10.54cm" svg:x="13.843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4.752cm" svg:height="10.286cm" svg:x="13.97cm" svg:y="2.921cm">
          <draw:image xlink:href="Pictures/100000000000030C00000698FCC53EAB.png" xlink:type="simple" xlink:show="embed" xlink:actuate="onLoad" draw:mime-type="image/png">
            <text:p/>
          </draw:image>
          <svg:desc>C:\Users\Rosa Accarino\OneDrive\Desktop\Giuseppe\Università\Mobile programming\FitTrack\docs\screenshots\08-agenda.png</svg:desc>
        </draw:frame>
        <draw:custom-shape draw:name="Shape 4" draw:style-name="gr5" draw:text-style-name="P3" draw:layer="layout" svg:width="5.006cm" svg:height="10.54cm" svg:x="19.177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1" draw:style-name="gr6" draw:text-style-name="P4" draw:layer="layout" svg:width="4.752cm" svg:height="10.286cm" svg:x="19.304cm" svg:y="2.921cm">
          <draw:image xlink:href="Pictures/100000000000030C000006981C696E94.png" xlink:type="simple" xlink:show="embed" xlink:actuate="onLoad" draw:mime-type="image/png">
            <text:p/>
          </draw:image>
          <svg:desc>C:\Users\Rosa Accarino\OneDrive\Desktop\Giuseppe\Università\Mobile programming\FitTrack\docs\screenshots\09-sessione-form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La pianificazione è per giorno, senza orario: scelta deliberata di semplicità. Gli stati alimentano la statistica pianificato vs completato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Text 0" draw:style-name="gr35" draw:text-style-name="P2" draw:layer="layout" svg:width="22.859cm" svg:height="1.396cm" svg:x="1.27cm" svg:y="0.711cm">
          <text:p text:style-name="P1"><text:span text:style-name="T8">Diario e confro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" draw:text-style-name="P2" draw:layer="layout" svg:width="22.859cm" svg:height="0.761cm" svg:x="1.27cm" svg:y="1.981cm">
          <text:p text:style-name="P1"><text:span text:style-name="T3">Registrazione e progressi nel temp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7" draw:text-style-name="P10" draw:layer="layout" svg:width="11.937cm" svg:height="9.905cm" svg:x="1.27cm" svg:y="3.302cm">
          <text:list text:style-name="L7">
            <text:list-item>
              <text:p text:style-name="P9"><text:span text:style-name="T10">Storico con durata, serie, volume e fatica percepita (1–10)</text:span></text:p>
            </text:list-item>
            <text:list-item>
              <text:p text:style-name="P9"><text:span text:style-name="T10">Registrazione manuale con precompilazione da scheda</text:span></text:p>
            </text:list-item>
            <text:list-item>
              <text:p text:style-name="P9"><text:span text:style-name="T10">Ogni serie è modificabile: ripetizioni e carico effettivi</text:span></text:p>
            </text:list-item>
            <text:list-item>
              <text:p text:style-name="P9"><text:span text:style-name="T10">Filtri per periodo (settimana, mese, 30 giorni)</text:span></text:p>
            </text:list-item>
            <text:list-item>
              <text:p text:style-name="P9"><text:span text:style-name="T15">Consente il confronto tra due allenamenti svolti in precedenza: metriche complessive con delta ed esercizi in comune (volume, carico max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" draw:text-style-name="P3" draw:layer="layout" svg:width="5.006cm" svg:height="10.54cm" svg:x="13.843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4.752cm" svg:height="10.286cm" svg:x="13.97cm" svg:y="2.921cm">
          <draw:image xlink:href="Pictures/100000000000030C00000698BCFD6DBE.png" xlink:type="simple" xlink:show="embed" xlink:actuate="onLoad" draw:mime-type="image/png">
            <text:p/>
          </draw:image>
          <svg:desc>C:\Users\Rosa Accarino\OneDrive\Desktop\Giuseppe\Università\Mobile programming\FitTrack\docs\screenshots\10-diario.png</svg:desc>
        </draw:frame>
        <draw:custom-shape draw:name="Shape 4" draw:style-name="gr5" draw:text-style-name="P3" draw:layer="layout" svg:width="5.006cm" svg:height="10.54cm" svg:x="19.177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1" draw:style-name="gr6" draw:text-style-name="P4" draw:layer="layout" svg:width="4.752cm" svg:height="10.286cm" svg:x="19.304cm" svg:y="2.921cm">
          <draw:image xlink:href="Pictures/100000000000030C0000069810985721.png" xlink:type="simple" xlink:show="embed" xlink:actuate="onLoad" draw:mime-type="image/png">
            <text:p/>
          </draw:image>
          <svg:desc>C:\Users\Rosa Accarino\OneDrive\Desktop\Giuseppe\Università\Mobile programming\FitTrack\docs\screenshots\12-confronto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6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Nel diario ogni voce salva anche il nome dell’esercizio come snapshot: lo storico resta leggibile anche se un esercizio viene rinominato o eliminato. Il confronto mostra la progressione: qui squat da 65 a 70 kg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Text 0" draw:style-name="gr38" draw:text-style-name="P2" draw:layer="layout" svg:width="22.859cm" svg:height="1.396cm" svg:x="1.27cm" svg:y="0.711cm">
          <text:p text:style-name="P1"><text:span text:style-name="T8">Feature avanzata: allenamento guida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9" draw:text-style-name="P2" draw:layer="layout" svg:width="22.859cm" svg:height="0.761cm" svg:x="1.27cm" svg:y="1.981cm">
          <text:p text:style-name="P1"><text:span text:style-name="T3">Con timer di recupero automat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0" draw:text-style-name="P13" draw:layer="layout" svg:width="1.066cm" svg:height="1.066cm" svg:x="1.27cm" svg:y="3.3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41" draw:text-style-name="P15" draw:layer="layout" svg:width="1.066cm" svg:height="1.066cm" svg:x="1.27cm" svg:y="3.353cm">
          <text:p text:style-name="P14"><text:span text:style-name="T16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2" draw:text-style-name="P2" draw:layer="layout" svg:width="10.413cm" svg:height="2.158cm" svg:x="2.794cm" svg:y="3.302cm">
          <text:p text:style-name="P1"><text:span text:style-name="T5">Avvio <text:s/></text:span><text:span text:style-name="T3">dalla scheda, dall’Agenda o dalla Ho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0" draw:text-style-name="P13" draw:layer="layout" svg:width="1.066cm" svg:height="1.066cm" svg:x="1.27cm" svg:y="5.58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43" draw:text-style-name="P15" draw:layer="layout" svg:width="1.066cm" svg:height="1.066cm" svg:x="1.27cm" svg:y="5.588cm">
          <text:p text:style-name="P14"><text:span text:style-name="T16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4" draw:text-style-name="P2" draw:layer="layout" svg:width="10.413cm" svg:height="2.158cm" svg:x="2.794cm" svg:y="5.537cm">
          <text:p text:style-name="P1"><text:span text:style-name="T5">Esecuzione <text:s/></text:span><text:span text:style-name="T3">serie per serie, con target di ripetizioni e car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0" draw:text-style-name="P13" draw:layer="layout" svg:width="1.066cm" svg:height="1.066cm" svg:x="1.27cm" svg:y="7.82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45" draw:text-style-name="P15" draw:layer="layout" svg:width="1.066cm" svg:height="1.066cm" svg:x="1.27cm" svg:y="7.823cm">
          <text:p text:style-name="P14"><text:span text:style-name="T16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6" draw:text-style-name="P2" draw:layer="layout" svg:width="10.413cm" svg:height="2.158cm" svg:x="2.794cm" svg:y="7.772cm">
          <text:p text:style-name="P1"><text:span text:style-name="T5">Recupero <text:s/></text:span><text:span text:style-name="T3">countdown automatico, +15 s o salta, vibrazione a fine tim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0" draw:text-style-name="P13" draw:layer="layout" svg:width="1.066cm" svg:height="1.066cm" svg:x="1.27cm" svg:y="10.05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47" draw:text-style-name="P15" draw:layer="layout" svg:width="1.066cm" svg:height="1.066cm" svg:x="1.27cm" svg:y="10.058cm">
          <text:p text:style-name="P14"><text:span text:style-name="T16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8" draw:text-style-name="P2" draw:layer="layout" svg:width="10.413cm" svg:height="2.158cm" svg:x="2.794cm" svg:y="10.008cm">
          <text:p text:style-name="P1"><text:span text:style-name="T5">Salvataggio <text:s/></text:span><text:span text:style-name="T3">voce nel diario + sessione marcata complet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9" draw:text-style-name="P2" draw:layer="layout" svg:width="11.937cm" svg:height="1.396cm" svg:x="1.27cm" svg:y="12.3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" draw:text-style-name="P3" draw:layer="layout" svg:width="5.006cm" svg:height="10.54cm" svg:x="13.843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4.752cm" svg:height="10.286cm" svg:x="13.97cm" svg:y="2.921cm">
          <draw:image xlink:href="Pictures/100000000000030C00000698BBEA768B.png" xlink:type="simple" xlink:show="embed" xlink:actuate="onLoad" draw:mime-type="image/png">
            <text:p/>
          </draw:image>
          <svg:desc>C:\Users\Rosa Accarino\OneDrive\Desktop\Giuseppe\Università\Mobile programming\FitTrack\docs\screenshots\07-allenamento-guidato.png</svg:desc>
        </draw:frame>
        <draw:custom-shape draw:name="Shape 16" draw:style-name="gr5" draw:text-style-name="P3" draw:layer="layout" svg:width="5.006cm" svg:height="10.54cm" svg:x="19.177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1" draw:style-name="gr6" draw:text-style-name="P4" draw:layer="layout" svg:width="4.752cm" svg:height="10.286cm" svg:x="19.304cm" svg:y="2.921cm">
          <draw:image xlink:href="Pictures/100000000000030C000006987BAFEAD9.png" xlink:type="simple" xlink:show="embed" xlink:actuate="onLoad" draw:mime-type="image/png">
            <text:p/>
          </draw:image>
          <svg:desc>C:\Users\Rosa Accarino\OneDrive\Desktop\Giuseppe\Università\Mobile programming\FitTrack\docs\screenshots\15-recupero-timer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7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La schermata è una macchina a stati con tre fasi: lavoro, recupero, riepilogo. Due timer con setInterval e cleanup negli useEffect. Alla fine crea la voce di diario e completa la sessione: è la feature che collega tutte le parti dell’app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Text 0" draw:style-name="gr50" draw:text-style-name="P2" draw:layer="layout" svg:width="22.859cm" svg:height="1.396cm" svg:x="1.27cm" svg:y="0.711cm">
          <text:p text:style-name="P1"><text:span text:style-name="T8">Statistiche e obiettiv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1" draw:text-style-name="P2" draw:layer="layout" svg:width="22.859cm" svg:height="0.761cm" svg:x="1.27cm" svg:y="1.981cm">
          <text:p text:style-name="P1"><text:span text:style-name="T3">Riepiloghi e avanzamento automat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2" draw:text-style-name="P17" draw:layer="layout" svg:width="11.937cm" svg:height="9.905cm" svg:x="1.27cm" svg:y="3.302cm">
          <text:list text:style-name="L7">
            <text:list-item>
              <text:p text:style-name="P16"><text:span text:style-name="T10">Storico degli allenamenti per settimana (ultime 8) e media settimanale</text:span></text:p>
            </text:list-item>
            <text:list-item>
              <text:p text:style-name="P16"><text:span text:style-name="T10">Minuti e volume totale degli ultimi 30 giorni</text:span></text:p>
            </text:list-item>
            <text:list-item>
              <text:p text:style-name="P16"><text:span text:style-name="T10">Distribuzione degli esercizi per gruppo muscolare</text:span></text:p>
            </text:list-item>
            <text:list-item>
              <text:p text:style-name="P16"><text:span text:style-name="T10">Sessioni pianificate vs completate nella settimana</text:span></text:p>
            </text:list-item>
            <text:list-item>
              <text:p text:style-name="P16"><text:span text:style-name="T15">Obiettivi con avanzamento automatico: frequenza e durata calcolate dal diario, senza input manuale</text:span></text:p>
            </text:list-item>
            <text:list-item>
              <text:p text:style-name="P16"><text:span text:style-name="T10">Grafici custom con sole View: nessuna libreria esterna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" draw:text-style-name="P3" draw:layer="layout" svg:width="5.006cm" svg:height="10.54cm" svg:x="13.843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4.752cm" svg:height="10.286cm" svg:x="13.97cm" svg:y="2.921cm">
          <draw:image xlink:href="Pictures/100000000000030C0000069842A265C3.png" xlink:type="simple" xlink:show="embed" xlink:actuate="onLoad" draw:mime-type="image/png">
            <text:p/>
          </draw:image>
          <svg:desc>C:\Users\Rosa Accarino\OneDrive\Desktop\Giuseppe\Università\Mobile programming\FitTrack\docs\screenshots\13-statistiche.png</svg:desc>
        </draw:frame>
        <draw:custom-shape draw:name="Shape 4" draw:style-name="gr5" draw:text-style-name="P3" draw:layer="layout" svg:width="5.006cm" svg:height="10.54cm" svg:x="19.177cm" svg:y="2.794cm">
          <text:p/>
          <draw:enhanced-geometry draw:mirror-horizontal="false" draw:mirror-vertical="false" svg:viewBox="0 0 0 0" draw:glue-points="?f8 0 0 ?f9 ?f8 ?f10 ?f11 ?f9" draw:text-areas="?f5 ?f5 ?f6 ?f7" draw:type="ooxml-roundRect" draw:modifiers="60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1" draw:style-name="gr6" draw:text-style-name="P4" draw:layer="layout" svg:width="4.752cm" svg:height="10.286cm" svg:x="19.304cm" svg:y="2.921cm">
          <draw:image xlink:href="Pictures/100000000000030C00000698B6C7C965.png" xlink:type="simple" xlink:show="embed" xlink:actuate="onLoad" draw:mime-type="image/png">
            <text:p/>
          </draw:image>
          <svg:desc>C:\Users\Rosa Accarino\OneDrive\Desktop\Giuseppe\Università\Mobile programming\FitTrack\docs\screenshots\14-obiettivi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8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Per frequenza e durata il valore attuale non è memorizzato: è una funzione pura dello storico, quindi non può mai essere disallineato dal diario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Text 0" draw:style-name="gr53" draw:text-style-name="P2" draw:layer="layout" svg:width="22.859cm" svg:height="1.396cm" svg:x="1.27cm" svg:y="0.711cm">
          <text:p text:style-name="P1"><text:span text:style-name="T8">Scelte progettual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4" draw:text-style-name="P2" draw:layer="layout" svg:width="22.859cm" svg:height="0.761cm" svg:x="1.27cm" svg:y="1.981cm">
          <text:p text:style-name="P1"><text:span text:style-name="T3">Architettura e stack tecnolog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" draw:text-style-name="P3" draw:layer="layout" svg:width="11.683cm" svg:height="2.082cm" svg:x="1.27cm" svg:y="3.302cm">
          <text:p/>
          <draw:enhanced-geometry draw:mirror-horizontal="false" draw:mirror-vertical="false" svg:viewBox="0 0 0 0" draw:glue-points="?f8 0 0 ?f9 ?f8 ?f10 ?f11 ?f9" draw:text-areas="?f5 ?f5 ?f6 ?f7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3" draw:style-name="gr55" draw:text-style-name="P2" draw:layer="layout" svg:width="10.667cm" svg:height="1.65cm" svg:x="1.829cm" svg:y="3.556cm">
          <text:p text:style-name="P1"><text:span text:style-name="T17">React Native 0.81 + Expo SDK 54</text:span></text:p>
          <text:p text:style-name="P1"><text:span text:style-name="T18">demo immediata su telefono con Expo 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" draw:text-style-name="P3" draw:layer="layout" svg:width="11.683cm" svg:height="2.082cm" svg:x="1.27cm" svg:y="5.791cm">
          <text:p/>
          <draw:enhanced-geometry draw:mirror-horizontal="false" draw:mirror-vertical="false" svg:viewBox="0 0 0 0" draw:glue-points="?f8 0 0 ?f9 ?f8 ?f10 ?f11 ?f9" draw:text-areas="?f5 ?f5 ?f6 ?f7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5" draw:style-name="gr56" draw:text-style-name="P2" draw:layer="layout" svg:width="10.667cm" svg:height="1.65cm" svg:x="1.829cm" svg:y="6.045cm">
          <text:p text:style-name="P1"><text:span text:style-name="T17">React Navigation 7</text:span></text:p>
          <text:p text:style-name="P1"><text:span text:style-name="T18">pattern tab + stack, passaggio dati via route param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" draw:text-style-name="P3" draw:layer="layout" svg:width="11.683cm" svg:height="2.082cm" svg:x="1.27cm" svg:y="8.28cm">
          <text:p/>
          <draw:enhanced-geometry draw:mirror-horizontal="false" draw:mirror-vertical="false" svg:viewBox="0 0 0 0" draw:glue-points="?f8 0 0 ?f9 ?f8 ?f10 ?f11 ?f9" draw:text-areas="?f5 ?f5 ?f6 ?f7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7" draw:style-name="gr57" draw:text-style-name="P2" draw:layer="layout" svg:width="10.667cm" svg:height="1.65cm" svg:x="1.829cm" svg:y="8.534cm">
          <text:p text:style-name="P1"><text:span text:style-name="T17">Context + useReducer</text:span></text:p>
          <text:p text:style-name="P1"><text:span text:style-name="T18">stato globale immutabile, regole di coerenza nel reduc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3" draw:layer="layout" svg:width="11.683cm" svg:height="2.082cm" svg:x="1.27cm" svg:y="10.77cm">
          <text:p/>
          <draw:enhanced-geometry draw:mirror-horizontal="false" draw:mirror-vertical="false" svg:viewBox="0 0 0 0" draw:glue-points="?f8 0 0 ?f9 ?f8 ?f10 ?f11 ?f9" draw:text-areas="?f5 ?f5 ?f6 ?f7" draw:type="ooxml-roundRect" draw:modifiers="9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9" draw:style-name="gr58" draw:text-style-name="P2" draw:layer="layout" svg:width="10.667cm" svg:height="1.65cm" svg:x="1.829cm" svg:y="11.024cm">
          <text:p text:style-name="P1"><text:span text:style-name="T17">AsyncStorage</text:span></text:p>
          <text:p text:style-name="P1"><text:span text:style-name="T18">persistenza JSON automatica con debounce, seed demo al primo avv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9" draw:text-style-name="P3" draw:layer="layout" svg:width="8.635cm" svg:height="2.158cm" svg:x="14.986cm" svg:y="3.683cm">
          <text:p/>
          <draw:enhanced-geometry draw:mirror-horizontal="false" draw:mirror-vertical="false" svg:viewBox="0 0 0 0" draw:glue-points="?f8 0 0 ?f9 ?f8 ?f10 ?f11 ?f9" draw:text-areas="?f5 ?f5 ?f6 ?f7" draw:type="ooxml-roundRect" draw:modifiers="941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1" draw:style-name="gr60" draw:text-style-name="P2" draw:layer="layout" svg:width="7.619cm" svg:height="1.65cm" svg:x="15.494cm" svg:y="3.988cm">
          <text:p text:style-name="P1"><text:span text:style-name="T19">17 schermate</text:span></text:p>
          <text:p text:style-name="P1"><text:span text:style-name="T20">leggono lo stato, invocano azion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2" draw:style-name="gr61" draw:text-style-name="P4" draw:layer="layout" svg:x1="19.304cm" svg:y1="5.842cm" svg:x2="19.305cm" svg:y2="6.908cm">
          <text:p/>
        </draw:line>
        <draw:custom-shape draw:name="Shape 13" draw:style-name="gr62" draw:text-style-name="P3" draw:layer="layout" svg:width="8.635cm" svg:height="2.158cm" svg:x="14.986cm" svg:y="6.909cm">
          <text:p/>
          <draw:enhanced-geometry draw:mirror-horizontal="false" draw:mirror-vertical="false" svg:viewBox="0 0 0 0" draw:glue-points="?f8 0 0 ?f9 ?f8 ?f10 ?f11 ?f9" draw:text-areas="?f5 ?f5 ?f6 ?f7" draw:type="ooxml-roundRect" draw:modifiers="941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4" draw:style-name="gr63" draw:text-style-name="P2" draw:layer="layout" svg:width="7.619cm" svg:height="1.65cm" svg:x="15.494cm" svg:y="7.214cm">
          <text:p text:style-name="P1"><text:span text:style-name="T21">Store centrale</text:span></text:p>
          <text:p text:style-name="P1"><text:span text:style-name="T20">reducer puro + azioni con no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5" draw:style-name="gr61" draw:text-style-name="P4" draw:layer="layout" svg:x1="19.304cm" svg:y1="9.067cm" svg:x2="19.305cm" svg:y2="10.134cm">
          <text:p/>
        </draw:line>
        <draw:custom-shape draw:name="Shape 16" draw:style-name="gr64" draw:text-style-name="P3" draw:layer="layout" svg:width="8.635cm" svg:height="2.158cm" svg:x="14.986cm" svg:y="10.135cm">
          <text:p/>
          <draw:enhanced-geometry draw:mirror-horizontal="false" draw:mirror-vertical="false" svg:viewBox="0 0 0 0" draw:glue-points="?f8 0 0 ?f9 ?f8 ?f10 ?f11 ?f9" draw:text-areas="?f5 ?f5 ?f6 ?f7" draw:type="ooxml-roundRect" draw:modifiers="941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7" draw:style-name="gr65" draw:text-style-name="P2" draw:layer="layout" svg:width="7.619cm" svg:height="1.65cm" svg:x="15.494cm" svg:y="10.439cm">
          <text:p text:style-name="P1"><text:span text:style-name="T22">Persistenza locale</text:span></text:p>
          <text:p text:style-name="P1"><text:span text:style-name="T20">JSON in AsyncStorage (fittrack:v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66" draw:text-style-name="P2" draw:layer="layout" svg:width="9.143cm" svg:height="1.269cm" svg:x="14.986cm" svg:y="12.7cm">
          <text:p text:style-name="P1"><text:span text:style-name="T23">Flusso dati unidirezionale · date come stringhe ISO · nessuna libreria di grafici o sta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9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React Native scelto per familiarità con JavaScript; Expo per il ciclo di sviluppo e la demo con Expo Go. Store con Context e useReducer: il reducer è l’unico punto che modifica i dati, comprese le cascate di eliminazione. Persistenza trasparente con debounce di 250 ms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Text 0" draw:style-name="gr67" draw:text-style-name="P2" draw:layer="layout" svg:width="11.683cm" svg:height="2.031cm" svg:x="1.524cm" svg:y="2.921cm">
          <text:p text:style-name="P1"><text:span text:style-name="T24">De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8" draw:text-style-name="P2" draw:layer="layout" svg:width="11.683cm" svg:height="1.015cm" svg:x="1.524cm" svg:y="5.08cm">
          <text:p text:style-name="P1"><text:span text:style-name="T25">L’app viene eseguita dal vivo su dispositivo rea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" draw:text-style-name="P3" draw:layer="layout" svg:width="11.175cm" svg:height="3.428cm" svg:x="1.524cm" svg:y="6.604cm">
          <text:p/>
          <draw:enhanced-geometry draw:mirror-horizontal="false" draw:mirror-vertical="false" svg:viewBox="0 0 0 0" draw:glue-points="?f8 0 0 ?f9 ?f8 ?f10 ?f11 ?f9" draw:text-areas="?f5 ?f5 ?f6 ?f7" draw:type="ooxml-roundRect" draw:modifiers="59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3" draw:style-name="gr69" draw:text-style-name="P19" draw:layer="layout" svg:width="10.159cm" svg:height="2.92cm" svg:x="2.159cm" svg:y="6.985cm">
          <text:p text:style-name="P18"><text:span text:style-name="T15">Per provarla:</text:span></text:p>
          <text:p text:style-name="P1"><text:span text:style-name="T26">npm install</text:span></text:p>
          <text:p text:style-name="P18"><text:span text:style-name="T26">npx expo start</text:span></text:p>
          <text:p text:style-name="P1"><text:span text:style-name="T27">poi QR code con Expo Go (Android/iO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0" draw:text-style-name="P2" draw:layer="layout" svg:width="11.429cm" svg:height="2.031cm" svg:x="1.524cm" svg:y="10.795cm">
          <text:p text:style-name="P1"><text:span text:style-name="T15">Flusso della demo: <text:s/></text:span><text:span text:style-name="T27">Home → Agenda → allenamento guidato → diario → confronto → statistiche e obiettiv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1" draw:text-style-name="P2" draw:layer="layout" svg:width="11.429cm" svg:height="1.015cm" svg:x="1.524cm" svg:y="12.827cm">
          <text:p text:style-name="P1"><text:span text:style-name="T28">Grazie per l’attenzione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" draw:text-style-name="P3" draw:layer="layout" svg:width="4.948cm" svg:height="10.413cm" svg:x="13.716cm" svg:y="2.032cm">
          <text:p/>
          <draw:enhanced-geometry draw:mirror-horizontal="false" draw:mirror-vertical="false" svg:viewBox="0 0 0 0" draw:glue-points="?f8 0 0 ?f9 ?f8 ?f10 ?f11 ?f9" draw:text-areas="?f5 ?f5 ?f6 ?f7" draw:type="ooxml-roundRect" draw:modifiers="61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0" draw:style-name="gr6" draw:text-style-name="P4" draw:layer="layout" svg:width="4.694cm" svg:height="10.159cm" svg:x="13.843cm" svg:y="2.159cm">
          <draw:image xlink:href="Pictures/100000000000030C00000698FCC53EAB.png" xlink:type="simple" xlink:show="embed" xlink:actuate="onLoad" draw:mime-type="image/png">
            <text:p/>
          </draw:image>
          <svg:desc>C:\Users\Rosa Accarino\OneDrive\Desktop\Giuseppe\Università\Mobile programming\FitTrack\docs\screenshots\08-agenda.png</svg:desc>
        </draw:frame>
        <draw:custom-shape draw:name="Shape 7" draw:style-name="gr5" draw:text-style-name="P3" draw:layer="layout" svg:width="4.948cm" svg:height="10.413cm" svg:x="18.923cm" svg:y="1.397cm">
          <text:p/>
          <draw:enhanced-geometry draw:mirror-horizontal="false" draw:mirror-vertical="false" svg:viewBox="0 0 0 0" draw:glue-points="?f8 0 0 ?f9 ?f8 ?f10 ?f11 ?f9" draw:text-areas="?f5 ?f5 ?f6 ?f7" draw:type="ooxml-roundRect" draw:modifiers="61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frame draw:name="Image 1" draw:style-name="gr6" draw:text-style-name="P4" draw:layer="layout" svg:width="4.694cm" svg:height="10.159cm" svg:x="19.05cm" svg:y="1.524cm">
          <draw:image xlink:href="Pictures/100000000000030C000006987BAFEAD9.png" xlink:type="simple" xlink:show="embed" xlink:actuate="onLoad" draw:mime-type="image/png">
            <text:p/>
          </draw:image>
          <svg:desc>C:\Users\Rosa Accarino\OneDrive\Desktop\Giuseppe\Università\Mobile programming\FitTrack\docs\screenshots\15-recupero-timer.png</svg:desc>
        </draw:frame>
        <presentation:notes draw:style-name="dp2">
          <draw:page-thumbnail draw:name="Slide Image Placeholder 1" draw:style-name="gr7" draw:layer="layout" svg:width="15.239cm" svg:height="8.572cm" svg:x="1.905cm" svg:y="3.175cm" draw:page-number="10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6">Demo dal vivo: dalla Home si avvia la sessione di oggi, si completano un paio di serie mostrando il timer, si salva nel diario e si mostra il confronto e l’aggiornamento automatico di statistiche e obiettivi. Ripristino dati demo disponibile dalla Home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itTrack – Fitness &amp; Workout Tracker</dc:title>
    <dc:subject>PptxGenJS Presentation</dc:subject>
    <meta:initial-creator>Giuseppe Apostolico</meta:initial-creator>
    <meta:editing-cycles>4</meta:editing-cycles>
    <meta:creation-date>2026-07-13T15:05:30</meta:creation-date>
    <dc:date>2026-07-13T22:15:55.954384927</dc:date>
    <meta:editing-duration>PT1M53S</meta:editing-duration>
    <meta:generator>LibreOffice/26.2.4.2$Linux_X86_64 LibreOffice_project/620$Build-2</meta:generator>
    <meta:document-statistic meta:object-count="162"/>
    <meta:user-defined meta:name="AppVersion">16.0000</meta:user-defined>
    <meta:user-defined meta:name="Company">PptxGenJS</meta:user-defined>
    <meta:user-defined meta:name="Notes" meta:value-type="float">11</meta:user-defined>
    <meta:user-defined meta:name="PresentationFormat">On-screen Show (16:9)</meta:user-defined>
    <meta:user-defined meta:name="Slides" meta:value-type="float">11</meta:user-defined>
  </office:meta>
</office:document-meta>
</file>